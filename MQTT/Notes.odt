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BE8000003A0E1F0C1EA522E08A3.png" manifest:media-type="image/png"/>
  <manifest:file-entry manifest:full-path="Pictures/1000020100000B73000004934B22720361B8D9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f09e9" officeooo:paragraph-rsid="000f09e9" style:font-size-asian="16pt" style:font-size-complex="16pt"/>
    </style:style>
    <style:style style:name="P2" style:family="paragraph" style:parent-style-name="Standard">
      <style:text-properties fo:font-size="12pt" officeooo:rsid="00125aa6" officeooo:paragraph-rsid="00125aa6" style:font-size-asian="10.5pt" style:font-size-complex="12pt"/>
    </style:style>
    <style:style style:name="P3" style:family="paragraph" style:parent-style-name="Standard">
      <style:text-properties fo:font-size="12pt" officeooo:rsid="003011f1" officeooo:paragraph-rsid="003011f1" style:font-size-asian="10.5pt" style:font-size-complex="12pt"/>
    </style:style>
    <style:style style:name="P4" style:family="paragraph" style:parent-style-name="Standard">
      <style:text-properties fo:font-size="12pt" fo:font-weight="bold" officeooo:rsid="0014f84f" officeooo:paragraph-rsid="0014f84f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b6c4f" officeooo:paragraph-rsid="001b6c4f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d31c1" officeooo:paragraph-rsid="001d31c1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d31c1" officeooo:paragraph-rsid="0026b60e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290832" officeooo:paragraph-rsid="00290832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33a289" officeooo:paragraph-rsid="0033a289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normal" officeooo:rsid="0026b60e" officeooo:paragraph-rsid="0026b60e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290832" officeooo:paragraph-rsid="00290832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5e57a" officeooo:paragraph-rsid="0014f84f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9bebb" officeooo:paragraph-rsid="0029bebb" style:font-size-asian="10.5pt" style:font-weight-asian="normal" style:font-size-complex="12pt" style:font-weight-complex="normal"/>
    </style:style>
    <style:style style:name="P14" style:family="paragraph" style:parent-style-name="Standard">
      <style:text-properties officeooo:paragraph-rsid="001d31c1"/>
    </style:style>
    <style:style style:name="P15" style:family="paragraph" style:parent-style-name="Standard">
      <style:text-properties fo:font-weight="bold" officeooo:rsid="0026b60e" officeooo:paragraph-rsid="0026b60e" style:font-weight-asian="bold" style:font-weight-complex="bold"/>
    </style:style>
    <style:style style:name="P16" style:family="paragraph" style:parent-style-name="Standard">
      <style:text-properties officeooo:paragraph-rsid="00321f0e"/>
    </style:style>
    <style:style style:name="P17" style:family="paragraph" style:parent-style-name="Standard">
      <style:text-properties fo:font-weight="normal" officeooo:paragraph-rsid="00321f0e" style:font-weight-asian="normal" style:font-weight-complex="normal"/>
    </style:style>
    <style:style style:name="P18" style:family="paragraph" style:parent-style-name="Text_20_body">
      <style:text-properties officeooo:paragraph-rsid="0026b60e"/>
    </style:style>
    <style:style style:name="P19" style:family="paragraph" style:parent-style-name="Text_20_body">
      <style:text-properties officeooo:paragraph-rsid="0039dd5f"/>
    </style:style>
    <style:style style:name="P20" style:family="paragraph" style:parent-style-name="Text_20_body">
      <style:text-properties officeooo:paragraph-rsid="0039dd5f" loext:padding="0cm" loext:border="none"/>
    </style:style>
    <style:style style:name="P21" style:family="paragraph" style:parent-style-name="Standard">
      <style:text-properties fo:font-size="12pt" fo:font-weight="normal" officeooo:rsid="0029bebb" officeooo:paragraph-rsid="00428c05" style:font-size-asian="10.5pt" style:font-weight-asian="normal" style:font-size-complex="12pt" style:font-weight-complex="normal"/>
    </style:style>
    <style:style style:name="P22" style:family="paragraph" style:parent-style-name="Standard">
      <style:text-properties officeooo:paragraph-rsid="0029be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17b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e57a" style:font-weight-asian="normal" style:font-weight-complex="normal"/>
    </style:style>
    <style:style style:name="T5" style:family="text">
      <style:text-properties fo:font-weight="normal" officeooo:rsid="001a7aa4" style:font-weight-asian="normal" style:font-weight-complex="normal"/>
    </style:style>
    <style:style style:name="T6" style:family="text">
      <style:text-properties fo:font-weight="normal" officeooo:rsid="001b6c4f" style:font-weight-asian="normal" style:font-weight-complex="normal"/>
    </style:style>
    <style:style style:name="T7" style:family="text">
      <style:text-properties fo:font-weight="normal" officeooo:rsid="0023de33" style:font-weight-asian="normal" style:font-weight-complex="normal"/>
    </style:style>
    <style:style style:name="T8" style:family="text">
      <style:text-properties fo:font-weight="normal" officeooo:rsid="0023fcb3" style:font-weight-asian="normal" style:font-weight-complex="normal"/>
    </style:style>
    <style:style style:name="T9" style:family="text">
      <style:text-properties fo:font-weight="normal" officeooo:rsid="00333841" style:font-weight-asian="normal" style:font-weight-complex="normal"/>
    </style:style>
    <style:style style:name="T10" style:family="text">
      <style:text-properties officeooo:rsid="0015e57a"/>
    </style:style>
    <style:style style:name="T11" style:family="text">
      <style:text-properties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d31c1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1f25ab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23de33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321f0e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29bebb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428c05" style:font-size-asian="10.5pt" style:font-weight-asian="normal" style:font-size-complex="12pt" style:font-weight-complex="normal"/>
    </style:style>
    <style:style style:name="T18" style:family="text">
      <style:text-properties fo:font-size="12pt" style:font-size-asian="10.5pt" style:font-size-complex="12pt"/>
    </style:style>
    <style:style style:name="T19" style:family="text">
      <style:text-properties fo:font-size="12pt" officeooo:rsid="001d31c1" style:font-size-asian="10.5pt" style:font-size-complex="12pt"/>
    </style:style>
    <style:style style:name="T20" style:family="text">
      <style:text-properties fo:font-size="12pt" officeooo:rsid="001d31c1" style:font-size-asian="10.5pt" style:font-size-complex="12pt" loext:padding="0cm" loext:border="none"/>
    </style:style>
    <style:style style:name="T21" style:family="text">
      <style:text-properties fo:font-size="12pt" fo:font-weight="bold" officeooo:rsid="00321f0e" style:font-size-asian="10.5pt" style:font-weight-asian="bold" style:font-size-complex="12pt" style:font-weight-complex="bold"/>
    </style:style>
    <style:style style:name="T22" style:family="text">
      <style:text-properties fo:font-size="12pt" fo:font-weight="bold" officeooo:rsid="001d31c1" style:font-size-asian="10.5pt" style:font-weight-asian="bold" style:font-size-complex="12pt" style:font-weight-complex="bold" loext:padding="0cm" loext:border="none"/>
    </style:style>
    <style:style style:name="T23" style:family="text">
      <style:text-properties officeooo:rsid="002aadc2"/>
    </style:style>
    <style:style style:name="T24" style:family="text">
      <style:text-properties fo:color="#e4572a" fo:font-size="12pt" officeooo:rsid="001d31c1" style:font-size-asian="10.5pt" style:font-size-complex="12pt" loext:padding="0cm" loext:border="none"/>
    </style:style>
    <style:style style:name="T25" style:family="text">
      <style:text-properties fo:color="#e4572a" fo:font-size="12pt" fo:font-weight="bold" officeooo:rsid="001d31c1" style:font-size-asian="10.5pt" style:font-weight-asian="bold" style:font-size-complex="12pt" style:font-weight-complex="bold" loext:padding="0cm" loext:border="none"/>
    </style:style>
    <style:style style:name="T26" style:family="text">
      <style:text-properties loext:padding="0cm" loext:border="none"/>
    </style:style>
    <style:style style:name="T27" style:family="text">
      <style:text-properties officeooo:rsid="0039376c"/>
    </style:style>
    <style:style style:name="T28" style:family="text">
      <style:text-properties fo:color="#fd602e" loext:padding="0cm" loext:border="none"/>
    </style:style>
    <style:style style:name="T29" style:family="text">
      <style:text-properties officeooo:rsid="00428c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QTT : (Message Queue Telementry Transport)</text:p>
      <text:p text:style-name="P3"><text:span text:style-name="T1">referance : </text:span><text:a xlink:type="simple" xlink:href="https://mosquitto.org/" text:style-name="Internet_20_link" text:visited-style-name="Visited_20_Internet_20_Link"><text:span text:style-name="T3">https://mosquitto.org/</text:span></text:a><text:span text:style-name="T3"> <text:s text:c="2"/></text:span><text:span text:style-name="T9">&amp; <text:s text:c="2"/>https://mosquitto.org/api/files/mosquitto-h.html</text:span></text:p>
      <text:p text:style-name="P16"><text:span text:style-name="T21">Summary </text:span><text:span text:style-name="T15">: </text:span><text:span text:style-name="T3">The MQTT protocol provides a lightweight method of carrying out messaging using a publish/subscribe model. This makes it suitable for Internet of Things messaging such as with low power sensors or mobile devices such as phones, embedded computers or microcontrollers.</text:span></text:p>
      <text:p text:style-name="P17"/>
      <text:p text:style-name="P2"><text:span text:style-name="T1">Components</text:span> : Publisher(sender like senors) , <text:span text:style-name="T2">Broker(Mediator)</text:span> , Subscriber(reciver like data base).</text:p>
      <text:p text:style-name="P4">Methods : <text:span text:style-name="T3">Connect , Disconnect , </text:span><text:span text:style-name="T4">Publis , </text:span><text:span text:style-name="T5">Sub</text:span><text:span text:style-name="T6">s</text:span><text:span text:style-name="T5">cribe</text:span><text:span text:style-name="T4">.</text:span></text:p>
      <text:p text:style-name="P5"><text:span text:style-name="T10">T</text:span>opic : <text:span text:style-name="T3">Topic is routing path (home/hall/temp)</text:span></text:p>
      <text:p text:style-name="P6">Wildcard : <text:span text:style-name="T3">Send all </text:span><text:span text:style-name="T8">subscriber</text:span><text:span text:style-name="T3"> data </text:span><text:span text:style-name="T7">have temp <text:s text:c="18"/></text:span><text:span text:style-name="T3">(home/+/temp) &lt;- single level wildcard <text:s/></text:span></text:p>
      <text:p text:style-name="P14"><text:span text:style-name="T12"><text:tab/> <text:s text:c="7"/></text:span><text:span text:style-name="T14">Send all data respect to home to all subscriber</text:span><text:span text:style-name="T12"> (home/#) <text:s text:c="9"/>&lt;- </text:span><text:span text:style-name="T13">multi-</text:span><text:span text:style-name="T12">level wildcard </text:span></text:p>
      <text:p text:style-name="P9">Flow of execution : </text:p>
      <text:p text:style-name="P7"><draw:frame draw:style-name="fr1" draw:name="Image1" text:anchor-type="char" svg:x="2.992cm" svg:y="0.467cm" svg:width="4.71cm" svg:height="1.882cm" draw:z-index="0"><draw:image xlink:href="Pictures/1000020100000B73000004934B22720361B8D9CE.png" xlink:type="simple" xlink:show="embed" xlink:actuate="onLoad" loext:mime-type="image/png"/></draw:frame></text:p>
      <text:p text:style-name="P7"><draw:frame draw:style-name="fr1" draw:name="Image2" text:anchor-type="char" svg:x="8.382cm" svg:y="0.065cm" svg:width="4.353cm" svg:height="1.803cm" draw:z-index="1"><draw:image xlink:href="Pictures/1000020100000BE8000003A0E1F0C1EA522E08A3.png" xlink:type="simple" xlink:show="embed" xlink:actuate="onLoad" loext:mime-type="image/png"/></draw:frame></text:p>
      <text:p text:style-name="P7"/>
      <text:p text:style-name="P7"/>
      <text:p text:style-name="P7"/>
      <text:p text:style-name="P18"><text:span text:style-name="T22"><text:tab/>There is </text:span><text:span text:style-name="Strong_20_Emphasis"><text:span text:style-name="T20">no alternative</text:span></text:span><text:span text:style-name="T22"> for clients (publishers and subscribers) to communicate via MQTT than to connect to a broker.<text:line-break/>The broker is the </text:span><text:span text:style-name="Strong_20_Emphasis"><text:span text:style-name="T24">central entity</text:span></text:span><text:span text:style-name="Strong_20_Emphasis"><text:span text:style-name="T25"> </text:span></text:span><text:span text:style-name="Strong_20_Emphasis"><text:span text:style-name="T26">All packets</text:span></text:span><text:span text:style-name="T26"> go through the broker, get checked for specific properties, and are, then sent by the broker to the subscribers The broker </text:span><text:span text:style-name="Strong_20_Emphasis"><text:span text:style-name="T26">covers</text:span></text:span><text:span text:style-name="T26"> most of the </text:span><text:span text:style-name="Strong_20_Emphasis"><text:span text:style-name="T26">workload</text:span></text:span><text:span text:style-name="T26">. Hence, the client device only has to do only </text:span><text:span text:style-name="Strong_20_Emphasis"><text:span text:style-name="T26">minimal processing</text:span></text:span><text:span text:style-name="T26">.</text:span></text:p>
      <text:p text:style-name="P19"><text:tab/><text:span text:style-name="T26">Overall it's possible to send up to </text:span><text:span text:style-name="Strong_20_Emphasis"><text:span text:style-name="T26">256MB</text:span></text:span><text:span text:style-name="T26"> in each Payload. Clients can subscribe to </text:span><text:span text:style-name="Strong_20_Emphasis"><text:span text:style-name="T26">any topic</text:span></text:span><text:span text:style-name="T26"> they want when a broker is </text:span><text:span text:style-name="Strong_20_Emphasis"><text:span text:style-name="T26">without</text:span></text:span><text:span text:style-name="T26"> enabled </text:span><text:span text:style-name="Strong_20_Emphasis"><text:span text:style-name="T26">security</text:span></text:span><text:span text:style-name="T26">.In some cases, no level of security might be without risk. But it's </text:span><text:span text:style-name="Strong_20_Emphasis"><text:span text:style-name="T26">always</text:span></text:span><text:span text:style-name="T26"> the </text:span><text:span text:style-name="Strong_20_Emphasis"><text:span text:style-name="T26">end</text:span></text:span><text:span text:style-name="T26"> </text:span><text:span text:style-name="Strong_20_Emphasis"><text:span text:style-name="T26">user </text:span></text:span><text:span text:style-name="T26">who has to decide what </text:span><text:span text:style-name="Strong_20_Emphasis"><text:span text:style-name="T26">level</text:span></text:span><text:span text:style-name="T26"> </text:span><text:span text:style-name="Strong_20_Emphasis"><text:span text:style-name="T26">of</text:span></text:span><text:span text:style-name="T26"> </text:span><text:span text:style-name="Strong_20_Emphasis"><text:span text:style-name="T26">security</text:span></text:span><text:span text:style-name="T26"> has to be chosen and how to implement it.Usually, the broker supports </text:span><text:span text:style-name="T28">common security measurements</text:span><text:span text:style-name="T26">, e.g., </text:span><text:span text:style-name="Strong_20_Emphasis"><text:span text:style-name="T26">TLS</text:span></text:span><text:span text:style-name="T26">. Still, the end-user has to ensure that the chosen measurements fit the security environment the broker is part of, </text:span>The <text:span text:style-name="Strong_20_Emphasis">default</text:span> <text:span text:style-name="Strong_20_Emphasis">secured</text:span> MQTT broker port is <text:span text:style-name="Strong_20_Emphasis">8883</text:span>. The standard <text:span text:style-name="Strong_20_Emphasis">unsecured</text:span> port is <text:span text:style-name="Strong_20_Emphasis">1883</text:span>.</text:p>
      <text:p text:style-name="P19"><text:span text:style-name="T26"><text:tab/></text:span><text:span text:style-name="Strong_20_Emphasis"><text:span text:style-name="T26">TCP</text:span></text:span><text:span text:style-name="T26"> embeds </text:span><text:span text:style-name="Strong_20_Emphasis"><text:span text:style-name="T26">TLS (Transport Layer Security)</text:span></text:span><text:span text:style-name="T26">, the successor of </text:span><text:span text:style-name="Strong_20_Emphasis"><text:span text:style-name="T26">SSL (Secure Sockets Layer), and allows </text:span></text:span><text:span text:style-name="T26">MQTT packets to be transmitted via encrypted pipes.The broker can identify the client on three different pieces of information given. The </text:span><text:span text:style-name="T28">clientId</text:span><text:span text:style-name="T26">, a </text:span><text:span text:style-name="T28">username, </text:span><text:span text:style-name="T26">and </text:span><text:span text:style-name="T28">password</text:span><text:span text:style-name="T26">, or a </text:span><text:span text:style-name="T28">client's certificate</text:span><text:span text:style-name="T26">.</text:span></text:p>
      <text:p text:style-name="P20"/>
      <text:p text:style-name="P7"/>
      <text:p text:style-name="P15"><text:span text:style-name="T19">P</text:span><text:span text:style-name="T18">re-Installation : </text:span><text:span text:style-name="T11">sudo apt-get install mosquitto</text:span></text:p>
      <text:p text:style-name="P10"><text:tab/><text:tab/> <text:s text:c="6"/>sudo apt-get install mosquitto-clients</text:p>
      <text:p text:style-name="P10"><text:tab/><text:tab/> <text:s text:c="6"/>sudo apt-get install libmosquitto-dev </text:p>
      <text:p text:style-name="P10"><text:tab/> <text:s text:c="18"/><text:span text:style-name="T27">Paho : </text:span>https://www.eclipse.org/paho/index.php?page=downloads.php</text:p>
      <text:p text:style-name="P8">Commands to execute :</text:p>
      <text:p text:style-name="P11">mosquitto -v <text:s text:c="4"/>//Establish server</text:p>
      <text:p text:style-name="P11">gcc mqtt_pub.c -o mqttpub -lmosquitto <text:s text:c="2"/>//compile a code</text:p>
      <text:p text:style-name="P13">mosquitto_<text:span text:style-name="T23">sub -t test/t1</text:span></text:p>
      <text:p text:style-name="P13">sudo ufw allow 1883</text:p>
      <text:p text:style-name="P22"><text:span text:style-name="T16">mosquitto_pub -p 1883 -h </text:span><text:span text:style-name="T17">127.0.0.1</text:span><text:span text:style-name="T16"> -t 'test/topic' -m 'helloWorld'</text:span></text:p>
      <text:p text:style-name="P21">mosquitto_sub -p 1883 <text:s/>-h <text:span text:style-name="T29">127.0.0.1</text:span> -t 'test/topic'</text:p>
      <text:p text:style-name="P8"/>
      <text:p text:style-name="P8"><text:soft-page-break/></text:p>
      <text:p text:style-name="P10"><text:tab/><text:tab/> <text:s text:c="6"/></text:p>
      <text:p text:style-name="P10"><text:tab/><text:tab/> <text:s text:c="3"/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0T17:19:11.051509204</meta:creation-date>
    <meta:generator>LibreOffice/6.4.7.2$Linux_X86_64 LibreOffice_project/40$Build-2</meta:generator>
    <dc:date>2023-03-23T15:24:30.013533504</dc:date>
    <meta:editing-duration>PT2H33M4S</meta:editing-duration>
    <meta:editing-cycles>41</meta:editing-cycles>
    <meta:document-statistic meta:table-count="0" meta:image-count="2" meta:object-count="0" meta:page-count="2" meta:paragraph-count="25" meta:word-count="376" meta:character-count="2607" meta:non-whitespace-character-count="2146"/>
  </office:meta>
</office:document-meta>
</file>